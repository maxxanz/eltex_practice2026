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7000002B73536AC67.png" manifest:media-type="image/png"/>
  <manifest:file-entry manifest:full-path="Pictures/1000000100000387000002B74FB46FCB.png" manifest:media-type="image/png"/>
  <manifest:file-entry manifest:full-path="Pictures/1000000100000387000002B7E160A6F1.png" manifest:media-type="image/png"/>
  <manifest:file-entry manifest:full-path="Pictures/1000000100000387000000E351AB417D.png" manifest:media-type="image/png"/>
  <manifest:file-entry manifest:full-path="Pictures/1000000100000387000002B78FC329E4.png" manifest:media-type="image/png"/>
  <manifest:file-entry manifest:full-path="Pictures/100000010000038700000359E6F494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6c" officeooo:paragraph-rsid="001dc36c"/>
    </style:style>
    <style:style style:name="P2" style:family="paragraph" style:parent-style-name="Standard">
      <style:text-properties officeooo:rsid="001dc36c" officeooo:paragraph-rsid="0025febe"/>
    </style:style>
    <style:style style:name="P3" style:family="paragraph" style:parent-style-name="Standard">
      <style:text-properties officeooo:rsid="001e91cf" officeooo:paragraph-rsid="001e91cf"/>
    </style:style>
    <style:style style:name="P4" style:family="paragraph" style:parent-style-name="Standard">
      <style:text-properties officeooo:rsid="001e91cf" officeooo:paragraph-rsid="0025febe"/>
    </style:style>
    <style:style style:name="P5" style:family="paragraph" style:parent-style-name="Standard">
      <style:text-properties officeooo:rsid="00206232" officeooo:paragraph-rsid="00206232"/>
    </style:style>
    <style:style style:name="P6" style:family="paragraph" style:parent-style-name="Standard">
      <style:text-properties officeooo:rsid="00206232" officeooo:paragraph-rsid="0025febe"/>
    </style:style>
    <style:style style:name="P7" style:family="paragraph" style:parent-style-name="Standard">
      <style:text-properties officeooo:rsid="00214e52" officeooo:paragraph-rsid="0025febe"/>
    </style:style>
    <style:style style:name="P8" style:family="paragraph" style:parent-style-name="Standard">
      <style:text-properties officeooo:rsid="00214e52" officeooo:paragraph-rsid="00214e52"/>
    </style:style>
    <style:style style:name="P9" style:family="paragraph" style:parent-style-name="Standard">
      <style:text-properties fo:color="#158466" loext:opacity="100%" officeooo:rsid="0025febe" officeooo:paragraph-rsid="0025febe"/>
    </style:style>
    <style:style style:name="P10" style:family="paragraph" style:parent-style-name="Standard">
      <style:text-properties officeooo:rsid="0022f7fc" officeooo:paragraph-rsid="0022f7fc"/>
    </style:style>
    <style:style style:name="P11" style:family="paragraph" style:parent-style-name="Standard">
      <style:text-properties officeooo:rsid="0022f7fc" officeooo:paragraph-rsid="0025febe"/>
    </style:style>
    <style:style style:name="P12" style:family="paragraph" style:parent-style-name="Standard">
      <style:text-properties officeooo:rsid="00247986" officeooo:paragraph-rsid="0025febe"/>
    </style:style>
    <style:style style:name="T1" style:family="text">
      <style:text-properties officeooo:rsid="001dc36c"/>
    </style:style>
    <style:style style:name="T2" style:family="text">
      <style:text-properties fo:color="#158466" loext:opacity="100%" officeooo:rsid="0025fe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text:line-break/></text:span><text:span text:style-name="T2">command: </text:span>ssh eltex-v14@217.71.138.1 -p 44556</text:p>
      <text:p text:style-name="Standard">The authenticity of host '[217.71.138.1]:44556 ([217.71.138.1]:44556)' can't be established.</text:p>
      <text:p text:style-name="Standard">ED25519 key fingerprint is SHA256:9EeAnPIp/wDj41XS55iG0Eff5a90ZLW9TTAI37NiBb0.</text:p>
      <text:p text:style-name="Standard">This key is not known by any other names</text:p>
      <text:p text:style-name="Standard">Are you sure you want to continue connecting (yes/no/[fingerprint])? yes</text:p>
      <text:p text:style-name="Standard">Warning: Permanently added '[217.71.138.1]:44556' (ED25519) to the list of known hosts.</text:p>
      <text:p text:style-name="Standard">eltex-v14@217.71.138.1's password: </text:p>
      <text:p text:style-name="Standard">Linux eltex-2026-summer 6.1.0-50-amd64 #1 SMP PREEMPT_DYNAMIC Debian 6.1.176-1 (2026-07-02) x86_64</text:p>
      <text:p text:style-name="Standard"/>
      <text:p text:style-name="Standard">The programs included with the Debian GNU/Linux system are free software;</text:p>
      <text:p text:style-name="Standard">the exact distribution terms for each program are described in the</text:p>
      <text:p text:style-name="Standard">individual files in /usr/share/doc/*/copyright.</text:p>
      <text:p text:style-name="Standard"/>
      <text:p text:style-name="Standard">Debian GNU/Linux comes with ABSOLUTELY NO WARRANTY, to the extent</text:p>
      <text:p text:style-name="Standard">permitted by applicable law.</text:p>
      <text:p text:style-name="Standard"/>
      <text:p text:style-name="P1">2.</text:p>
      <text:p text:style-name="P2"><text:span text:style-name="T2">command: </text:span>screen</text:p>
      <text:p text:style-name="P1"/>
      <text:p text:style-name="P2"><text:span text:style-name="T2">command: </text:span>w</text:p>
      <text:p text:style-name="P1"/>
      <text:p text:style-name="P1">ltex-v2 pts/58 <text:s text:c="2"/>:pts/5:S.1 <text:s text:c="6"/>12:32 <text:s text:c="3"/>6:47 <text:s text:c="2"/>0.01s <text:s text:c="2"/>? <text:s text:c="3"/>screen -S -d -m</text:p>
      <text:p text:style-name="P1">eltex-v1 pts/54 <text:s text:c="2"/>:pts/11:S.0 <text:s text:c="5"/>12:51 <text:s text:c="3"/>2.00s <text:s/>0.20s <text:s/>0.20s w</text:p>
      <text:p text:style-name="P1">eltex-v1 pts/60 <text:s text:c="2"/>:pts/102:S.0 <text:s text:c="4"/>12:43 <text:s text:c="3"/>3:08 <text:s text:c="2"/>0.00s <text:s text:c="2"/>? <text:s text:c="3"/>screen -r top</text:p>
      <text:p text:style-name="P1">eltex-v1 pts/63 <text:s text:c="2"/>:pts/52:S.0 <text:s text:c="5"/>12:37 <text:s text:c="2"/>14:08 <text:s text:c="2"/>0.00s <text:s text:c="2"/>? <text:s text:c="3"/>SCREEN</text:p>
      <text:p text:style-name="P1">eltex-v4 pts/67 <text:s text:c="2"/>:pts/37:S.0 <text:s text:c="5"/>12:40 <text:s text:c="3"/>8:35 <text:s text:c="2"/>0.00s <text:s text:c="2"/>? <text:s text:c="3"/>SCREEN</text:p>
      <text:p text:style-name="P1">eltex-v3 pts/68 <text:s text:c="2"/>92.125.152.58 <text:s text:c="3"/>12:52 <text:s text:c="2"/>11.00s <text:s/>0.00s <text:s text:c="2"/>? <text:s text:c="3"/>-bash</text:p>
      <text:p text:style-name="P1">eltex-v8 pts/70 <text:s text:c="2"/>88.216.75.131 <text:s text:c="3"/>12:52 <text:s text:c="3"/>1.00s <text:s/>0.00s <text:s text:c="2"/>? <text:s text:c="3"/>-bash</text:p>
      <text:p text:style-name="P1">eltex-v1 pts/71 <text:s text:c="2"/>:pts/102:S.1 <text:s text:c="4"/>12:50 <text:s text:c="3"/>1:19 <text:s text:c="2"/>0.00s <text:s text:c="2"/>? <text:s text:c="3"/>/usr/bin/bash</text:p>
      <text:p text:style-name="P1">eltex-v1 pts/76 <text:s text:c="2"/>92.125.152.58 <text:s text:c="3"/>12:35 <text:s text:c="3"/>4:22 <text:s text:c="2"/>0.00s <text:s text:c="2"/>? <text:s text:c="3"/>-bash</text:p>
      <text:p text:style-name="P1">eltex-v2 pts/77 <text:s text:c="2"/>92.125.152.58 <text:s text:c="3"/>12:48 <text:s text:c="3"/>3:33 <text:s text:c="2"/>0.00s <text:s text:c="2"/>? <text:s text:c="3"/>-bash</text:p>
      <text:p text:style-name="P1">eltex-v2 pts/82 <text:s text:c="2"/>92.125.152.58 <text:s text:c="3"/>12:37 <text:s text:c="3"/>9.00s <text:s/>0.01s <text:s text:c="2"/>? <text:s text:c="3"/>screen</text:p>
      <text:p text:style-name="P1">eltex-v4 pts/84 <text:s text:c="2"/>92.125.152.58 <text:s text:c="3"/>12:52 <text:s text:c="3"/>7.00s <text:s/>0.00s <text:s text:c="2"/>? <text:s text:c="3"/>-bash</text:p>
      <text:p text:style-name="P1">eltex-v1 pts/86 <text:s text:c="2"/>:pts/104:S.0 <text:s text:c="4"/>12:49 <text:s text:c="3"/>8:48 <text:s text:c="2"/>0.80s <text:s/>0.05s SCREEN -S top -d -m top</text:p>
      <text:p text:style-name="P1">eltex-v1 pts/87 <text:s text:c="2"/>92.125.152.58 <text:s text:c="3"/>12:42 <text:s text:c="3"/>7.00s <text:s/>0.01s <text:s text:c="2"/>? <text:s text:c="3"/>screen -r 14095.-d</text:p>
      <text:p text:style-name="P1">eltex-v3 pts/88 <text:s text:c="2"/>92.125.152.58 <text:s text:c="3"/>12:50 <text:s text:c="3"/>1:01 <text:s text:c="2"/>0.00s <text:s text:c="2"/>? <text:s text:c="3"/>screen</text:p>
      <text:p text:style-name="P1">eltex-v1 pts/89 <text:s text:c="2"/>91.78.219.164 <text:s text:c="3"/>12:41 <text:s text:c="3"/>7.00s <text:s/>0.01s <text:s text:c="2"/>? <text:s text:c="3"/>screen</text:p>
      <text:p text:style-name="P1">eltex-v4 pts/97 <text:s text:c="2"/>:pts/99:S.0 <text:s text:c="5"/>12:49 <text:s text:c="2"/>39.00s <text:s/>0.01s <text:s/>0.02s SCREEN</text:p>
      <text:p text:style-name="P1">eltex-v4 pts/99 <text:s text:c="2"/>92.125.152.58 <text:s text:c="3"/>12:42 <text:s text:c="2"/>39.00s <text:s/>0.01s <text:s text:c="2"/>? <text:s text:c="3"/>screen</text:p>
      <text:p text:style-name="P1">eltex-v7 pts/101 <text:s/>:pts/8:S.2 <text:s text:c="6"/>12:42 <text:s text:c="3"/>9:11 <text:s text:c="2"/>0.13s <text:s/>0.13s watch /usr/bin/vmstat</text:p>
      <text:p text:style-name="P1">eltex-v1 pts/102 <text:s/>92.125.152.58 <text:s text:c="3"/>12:43 <text:s text:c="2"/>15.00s <text:s/>0.00s <text:s text:c="2"/>? <text:s text:c="3"/>screen</text:p>
      <text:p text:style-name="P1">eltex-v1 pts/104 <text:s/>:pts/89:S.0 <text:s text:c="5"/>12:43 <text:s text:c="3"/>2:55 <text:s text:c="2"/>0.00s <text:s text:c="2"/>? <text:s text:c="3"/>screen -r 17152.top</text:p>
      <text:p text:style-name="P1">eltex-v2 pts/96 <text:s text:c="2"/>:pts/103:S.0 <text:s text:c="4"/>12:43 <text:s text:c="3"/>5:19 <text:s text:c="2"/>1.87s <text:s/>1.87s top</text:p>
      <text:p text:style-name="P1">eltex-v2 pts/105 <text:s/>92.125.152.58 <text:s text:c="3"/>12:50 <text:s text:c="3"/>1:54 <text:s text:c="2"/>0.00s <text:s text:c="2"/>? <text:s text:c="3"/>-bash</text:p>
      <text:p text:style-name="P1">eltex-v6 pts/106 <text:s/>:pts/44:S.0 <text:s text:c="5"/>12:44 <text:s text:c="3"/>2:23 <text:s text:c="2"/>0.00s <text:s text:c="2"/>? <text:s text:c="3"/>SCREEN</text:p>
      <text:p text:style-name="P1">eltex-v2 pts/109 <text:s/>:pts/58:S.0 <text:s text:c="5"/>12:45 <text:s text:c="3"/>6:47 <text:s text:c="2"/>0.00s <text:s text:c="2"/>? <text:s text:c="3"/>SCREEN -S -d -m</text:p>
      <text:p text:style-name="P1">eltex-v1 pts/111 <text:s/>:pts/122:S.0 <text:s text:c="4"/>12:51 <text:s text:c="2"/>13.00s <text:s/>0.01s <text:s/>0.01s vi report_part1.txt</text:p>
      <text:p text:style-name="P1">eltex-v4 pts/113 <text:s/>:pts/49:S.0 <text:s text:c="5"/>12:50 <text:s text:c="2"/>53.00s <text:s/>0.01s <text:s text:c="2"/>? <text:s text:c="3"/>SCREEN -S report vi report_p</text:p>
      <text:p text:style-name="P1">eltex-v4 pts/85 <text:s text:c="2"/>92.125.152.58 <text:s text:c="3"/>12:46 <text:s text:c="3"/>6:05 <text:s text:c="2"/>0.00s <text:s text:c="2"/>? <text:s text:c="3"/>-bash</text:p>
      <text:p text:style-name="P1">eltex-v2 pts/114 <text:s/>:pts/82:S.0 <text:s text:c="5"/>12:50 <text:s text:c="3"/>9.00s <text:s/>0.00s <text:s/>0.01s SCREEN</text:p>
      <text:p text:style-name="P1"><text:soft-page-break/>eltex-v4 pts/115 <text:s/>:pts/6:S.0 <text:s text:c="6"/>12:51 <text:s text:c="2"/>54.00s <text:s/>0.07s <text:s/>0.07s top</text:p>
      <text:p text:style-name="P1">eltex-v3 pts/116 <text:s/>:pts/120:S.1 <text:s text:c="4"/>12:50 <text:s text:c="3"/>1:35 <text:s text:c="2"/>0.00s <text:s text:c="2"/>? <text:s text:c="3"/>/usr/bin/bash</text:p>
      <text:p text:style-name="P1">eltex-v2 pts/119 <text:s/>92.125.152.58 <text:s text:c="3"/>12:47 <text:s text:c="3"/>7.00s <text:s/>0.01s <text:s/>0.01s -bash</text:p>
      <text:p text:style-name="P1">eltex-v2 pts/118 <text:s/>92.125.152.58 <text:s text:c="3"/>12:49 <text:s text:c="3"/>2:47 <text:s text:c="2"/>0.00s <text:s text:c="2"/>? <text:s text:c="3"/>-bash</text:p>
      <text:p text:style-name="P1">eltex-v1 pts/112 <text:s/>:pts/60:S.0 <text:s text:c="5"/>12:49 <text:s text:c="3"/>3:08 <text:s text:c="2"/>0.00s <text:s text:c="2"/>? <text:s text:c="3"/>SCREEN -S top -d -m</text:p>
      <text:p text:style-name="P1">eltex-v3 pts/120 <text:s/>79.110.48.110 <text:s text:c="3"/>12:49 <text:s text:c="3"/>1:35 <text:s text:c="2"/>0.00s <text:s text:c="2"/>? <text:s text:c="3"/>screen</text:p>
      <text:p text:style-name="P1">eltex-v2 pts/121 <text:s/>:pts/5:S.2 <text:s text:c="6"/>12:50 <text:s text:c="3"/>1:27 <text:s text:c="2"/>0.00s <text:s text:c="2"/>? <text:s text:c="3"/>/usr/bin/bash</text:p>
      <text:p text:style-name="P1">eltex-v1 pts/122 <text:s/>217.217.245.65 <text:s text:c="2"/>12:50 <text:s text:c="2"/>13.00s <text:s/>0.00s <text:s text:c="2"/>? <text:s text:c="3"/>screen -r 19397</text:p>
      <text:p text:style-name="P1">eltex-v2 pts/123 <text:s/>:pts/5:S.3 <text:s text:c="6"/>12:51 <text:s text:c="3"/>1:19 <text:s text:c="2"/>0.00s <text:s text:c="2"/>? <text:s text:c="3"/>/usr/bin/bash</text:p>
      <text:p text:style-name="P1">eltex-v1 pts/124 <text:s/>:pts/102:S.2 <text:s text:c="4"/>12:51 <text:s text:c="2"/>16.00s <text:s/>0.00s <text:s text:c="2"/>? <text:s text:c="3"/>/usr/bin/bash</text:p>
      <text:p text:style-name="P1">eltex-v3 pts/125 <text:s/>:pts/88:S.0 <text:s text:c="5"/>12:51 <text:s text:c="3"/>1:01 <text:s text:c="2"/>0.00s <text:s text:c="2"/>? <text:s text:c="3"/>SCREEN</text:p>
      <text:p text:style-name="P1"/>
      <text:p text:style-name="P2"><text:span text:style-name="T2">command: </text:span>ctrl-a d</text:p>
      <text:p text:style-name="P1"/>
      <text:p text:style-name="P1">[detached from 26782.pts-11.eltex-2026-summer]</text:p>
      <text:p text:style-name="P1"/>
      <text:p text:style-name="P3">3.</text:p>
      <text:p text:style-name="P1"/>
      <text:p text:style-name="P2"><text:span text:style-name="T2">command: s</text:span>creen -S top -d -m</text:p>
      <text:p text:style-name="P2"/>
      <text:p text:style-name="P2"><text:span text:style-name="T2">command: </text:span>screen -ls</text:p>
      <text:p text:style-name="P1"/>
      <text:p text:style-name="P1">There are screens on:</text:p>
      <text:p text:style-name="P1"><text:tab/>32640.top<text:tab/>(07/06/2026 12:56:52 PM)<text:tab/>(Detached)</text:p>
      <text:p text:style-name="P1"><text:tab/>26782.pts-11.eltex-2026-summer<text:tab/>(07/06/2026 12:51:47 PM)<text:tab/>(Detached)</text:p>
      <text:p text:style-name="P1">2 Sockets in /run/screen/S-eltex-v14.</text:p>
      <text:p text:style-name="P1"/>
      <text:p text:style-name="P2"><text:span text:style-name="T2">command: </text:span>screen -r top</text:p>
      <text:p text:style-name="P1"/>
      <text:p text:style-name="P4"><text:span text:style-name="T2">command: </text:span>top</text:p>
      <text:p text:style-name="P3"><draw:frame draw:style-name="fr1" draw:name="Изображение3" text:anchor-type="char" svg:width="6.6929in" svg:height="6.352in" draw:z-index="1"><draw:image xlink:href="Pictures/100000010000038700000359E6F494D8.png" xlink:type="simple" xlink:show="embed" xlink:actuate="onLoad" draw:mime-type="image/png"/></draw:frame><text:soft-page-break/></text:p>
      <text:p text:style-name="P3">4.</text:p>
      <text:p text:style-name="P3"/>
      <text:p text:style-name="P4"><text:span text:style-name="T2">command: </text:span>screen -ls</text:p>
      <text:p text:style-name="P3">There are screens on:</text:p>
      <text:p text:style-name="P3"><text:s text:c="8"/>32640.top <text:s text:c="6"/>(07/06/2026 12:56:52 PM) <text:s text:c="7"/>(Attached)</text:p>
      <text:p text:style-name="P3"><text:s text:c="8"/>26782.pts-11.eltex-2026-summer <text:s/>(07/06/2026 12:51:47 PM) <text:s text:c="7"/>(Detached)</text:p>
      <text:p text:style-name="P3">2 Sockets in /run/screen/S-eltex-v14.</text:p>
      <text:p text:style-name="P3"/>
      <text:p text:style-name="P3">5.</text:p>
      <text:p text:style-name="P3"/>
      <text:p text:style-name="P4"><text:span text:style-name="T2">command: </text:span>screen -r top</text:p>
      <text:p text:style-name="P3"/>
      <text:p text:style-name="P5">6.</text:p>
      <text:p text:style-name="P5"/>
      <text:p text:style-name="P4"><text:span text:style-name="T2">command: </text:span>ctrl-a c</text:p>
      <text:p text:style-name="P3"/>
      <text:p text:style-name="P3"/>
      <text:p text:style-name="P3"/>
      <text:p text:style-name="P5"><text:soft-page-break/>7. 8.</text:p>
      <text:p text:style-name="P5"/>
      <text:p text:style-name="P4"><text:span text:style-name="T2">command: </text:span>watch /usr/bin/vmstat</text:p>
      <text:p text:style-name="P3"><draw:frame draw:style-name="fr2" draw:name="Изображение2" text:anchor-type="char" svg:width="6.6929in" svg:height="1.6819in" draw:z-index="0"><draw:image xlink:href="Pictures/1000000100000387000000E351AB417D.png" xlink:type="simple" xlink:show="embed" xlink:actuate="onLoad" draw:mime-type="image/png"/></draw:frame></text:p>
      <text:p text:style-name="P3"/>
      <text:p text:style-name="P5">9.</text:p>
      <text:p text:style-name="P5"/>
      <text:p text:style-name="P6"><text:span text:style-name="T2">command: </text:span>ctrl-a «</text:p>
      <text:p text:style-name="P5"><draw:frame draw:style-name="fr3" draw:name="Изображение1" text:anchor-type="char" svg:width="6.6929in" svg:height="5.1508in" draw:z-index="2"><draw:image xlink:href="Pictures/1000000100000387000002B7E160A6F1.png" xlink:type="simple" xlink:show="embed" xlink:actuate="onLoad" draw:mime-type="image/png"/></draw:frame><text:s/></text:p>
      <text:p text:style-name="P5">10.</text:p>
      <text:p text:style-name="P5"/>
      <text:p text:style-name="P6"><text:span text:style-name="T2">command: </text:span>ctrl-a A</text:p>
      <text:p text:style-name="P5"/>
      <text:p text:style-name="P5"/>
      <text:p text:style-name="P5"/>
      <text:p text:style-name="P5"/>
      <text:p text:style-name="P5"/>
      <text:p text:style-name="P5"><draw:frame draw:style-name="fr3" draw:name="Изображение4" text:anchor-type="char" svg:width="6.6929in" svg:height="5.1508in" draw:z-index="3"><draw:image xlink:href="Pictures/1000000100000387000002B73536AC67.png" xlink:type="simple" xlink:show="embed" xlink:actuate="onLoad" draw:mime-type="image/png"/></draw:frame><text:soft-page-break/></text:p>
      <text:p text:style-name="P5"/>
      <text:p text:style-name="P5">11.</text:p>
      <text:p text:style-name="P5"/>
      <text:p text:style-name="P6"><text:span text:style-name="T2">command: </text:span>ctrl-a n</text:p>
      <text:p text:style-name="P5"/>
      <text:p text:style-name="P5">12.</text:p>
      <text:p text:style-name="P5"/>
      <text:p text:style-name="P7"><text:span text:style-name="T2">command: </text:span>ctrl-a d</text:p>
      <text:p text:style-name="P8"/>
      <text:p text:style-name="P8">[detached from 32640.top]</text:p>
      <text:p text:style-name="P8"/>
      <text:p text:style-name="P8">13.</text:p>
      <text:p text:style-name="P8"/>
      <text:p text:style-name="P7"><text:span text:style-name="T2">command: </text:span>screen -S new13 -d -m</text:p>
      <text:p text:style-name="P7"><text:span text:style-name="T2">command: </text:span>screen -r new13</text:p>
      <text:p text:style-name="P8"/>
      <text:p text:style-name="P7"><text:span text:style-name="T2">command: </text:span>vi report_part1.txt</text:p>
      <text:p text:style-name="P8"/>
      <text:p text:style-name="P8"><draw:frame draw:style-name="fr3" draw:name="Изображение5" text:anchor-type="char" svg:width="6.6929in" svg:height="5.1508in" draw:z-index="4"><draw:image xlink:href="Pictures/1000000100000387000002B74FB46FCB.png" xlink:type="simple" xlink:show="embed" xlink:actuate="onLoad" draw:mime-type="image/png"/></draw:frame><text:soft-page-break/></text:p>
      <text:p text:style-name="P8"/>
      <text:p text:style-name="P8">14.</text:p>
      <text:p text:style-name="P8"/>
      <text:p text:style-name="P7"><text:span text:style-name="T2">command: </text:span>ctrl-a d</text:p>
      <text:p text:style-name="P8"/>
      <text:p text:style-name="P8">[detached from 62623.new13]</text:p>
      <text:p text:style-name="P9"/>
      <text:p text:style-name="P7"><text:span text:style-name="T2">command: </text:span>screen -ls</text:p>
      <text:p text:style-name="P8"/>
      <text:p text:style-name="P8">There are screens on:</text:p>
      <text:p text:style-name="P8"><text:tab/>62623.new13<text:tab/>(07/06/2026 01:18:19 PM)<text:tab/>(Detached)</text:p>
      <text:p text:style-name="P8"><text:tab/>32640.top<text:tab/>(07/06/2026 12:56:52 PM)<text:tab/>(Detached)</text:p>
      <text:p text:style-name="P8"><text:tab/>26782.pts-11.eltex-2026-summer<text:tab/>(07/06/2026 12:51:47 PM)<text:tab/>(Detached)</text:p>
      <text:p text:style-name="P8">3 Sockets in /run/screen/S-eltex-v14.</text:p>
      <text:p text:style-name="P8"/>
      <text:p text:style-name="P8">15.</text:p>
      <text:p text:style-name="P8"/>
      <text:p text:style-name="P7"><text:span text:style-name="T2">command: </text:span>logout</text:p>
      <text:p text:style-name="P7"/>
      <text:p text:style-name="P8">Connection to 217.71.138.1 closed.</text:p>
      <text:p text:style-name="P8"/>
      <text:p text:style-name="P8">16.</text:p>
      <text:p text:style-name="P8"><text:s/></text:p>
      <text:p text:style-name="P7"><text:span text:style-name="T2">command: </text:span>ssh eltex-v14@217.71.138.1 -p 44556</text:p>
      <text:p text:style-name="P8"><text:soft-page-break/>eltex-v14@217.71.138.1's password: </text:p>
      <text:p text:style-name="P8">Linux eltex-2026-summer 6.1.0-50-amd64 #1 SMP PREEMPT_DYNAMIC Debian 6.1.176-1 (2026-07-02) x86_64</text:p>
      <text:p text:style-name="P8"/>
      <text:p text:style-name="P8">The programs included with the Debian GNU/Linux system are free software;</text:p>
      <text:p text:style-name="P8">the exact distribution terms for each program are described in the</text:p>
      <text:p text:style-name="P8">individual files in /usr/share/doc/*/copyright.</text:p>
      <text:p text:style-name="P8"/>
      <text:p text:style-name="P8">Debian GNU/Linux comes with ABSOLUTELY NO WARRANTY, to the extent</text:p>
      <text:p text:style-name="P8">permitted by applicable law.</text:p>
      <text:p text:style-name="P8">Last login: Mon Jul <text:s/>6 12:17:23 2026 from 92.125.152.58</text:p>
      <text:p text:style-name="P8"/>
      <text:p text:style-name="P10">17.</text:p>
      <text:p text:style-name="P10"/>
      <text:p text:style-name="P11"><text:span text:style-name="T2">command: </text:span>vi report_part1.txt</text:p>
      <text:p text:style-name="P10"/>
      <text:p text:style-name="P10"><draw:frame draw:style-name="fr4" draw:name="Изображение6" text:anchor-type="char" svg:x="0in" svg:y="0in" svg:width="6.6929in" svg:height="5.1508in" draw:z-index="5"><draw:image xlink:href="Pictures/1000000100000387000002B78FC329E4.png" xlink:type="simple" xlink:show="embed" xlink:actuate="onLoad" draw:mime-type="image/png"/></draw:frame></text:p>
      <text:p text:style-name="P10"/>
      <text:p text:style-name="P10">18.</text:p>
      <text:p text:style-name="P11"><text:span text:style-name="T2">command: </text:span>:wq</text:p>
      <text:p text:style-name="P10"/>
      <text:p text:style-name="P12"><text:span text:style-name="T2">command: </text:span>ctrl-a 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ъект_20_без_20_заливки" style:display-name="Объект без заливки" style:family="paragraph" style:parent-style-name="Standard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196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157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1181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0783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>
      <style:paragraph-properties fo:margin-top="0.196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1575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1181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0783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0398in" fo:margin-bottom="0in" style:contextual-spacing="false"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style:line-height-at-least="0.139in" fo:text-align="lef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2:44:42.373926297</meta:creation-date>
    <dc:date>2026-07-08T06:00:45.811592222</dc:date>
    <meta:editing-duration>PT6M18S</meta:editing-duration>
    <meta:editing-cycles>2</meta:editing-cycles>
    <meta:generator>LibreOffice/26.2.4.2$Linux_X86_64 LibreOffice_project/620$Build-2</meta:generator>
    <meta:document-statistic meta:table-count="0" meta:image-count="6" meta:object-count="0" meta:page-count="7" meta:paragraph-count="121" meta:word-count="682" meta:character-count="5535" meta:non-whitespace-character-count="4365"/>
  </office:meta>
</office:document-meta>
</file>